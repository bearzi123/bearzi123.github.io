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language="fr" fo:country="FR" officeooo:rsid="00168ffd" officeooo:paragraph-rsid="00168ffd"/>
    </style:style>
    <style:style style:name="P2" style:family="paragraph" style:parent-style-name="Standard">
      <style:paragraph-properties fo:text-align="start" style:justify-single-word="false"/>
      <style:text-properties fo:language="fr" fo:country="FR" officeooo:rsid="001c4f14" officeooo:paragraph-rsid="001c4f14"/>
    </style:style>
    <style:style style:name="P3" style:family="paragraph" style:parent-style-name="Standard">
      <style:paragraph-properties fo:text-align="start" style:justify-single-word="false"/>
      <style:text-properties fo:language="fr" fo:country="FR" fo:font-weight="normal" officeooo:rsid="00168ffd" officeooo:paragraph-rsid="00168ffd" style:font-weight-asian="normal" style:font-weight-complex="normal"/>
    </style:style>
    <style:style style:name="P4" style:family="paragraph" style:parent-style-name="Standard">
      <style:paragraph-properties fo:text-align="start" style:justify-single-word="false"/>
      <style:text-properties fo:language="fr" fo:country="FR" fo:font-weight="normal" officeooo:rsid="0018b079" officeooo:paragraph-rsid="00168ffd" style:font-weight-asian="normal" style:font-weight-complex="normal"/>
    </style:style>
    <style:style style:name="P5" style:family="paragraph" style:parent-style-name="Standard">
      <style:paragraph-properties fo:text-align="start" style:justify-single-word="false"/>
      <style:text-properties fo:language="fr" fo:country="FR" fo:font-weight="normal" officeooo:rsid="001c4f14" officeooo:paragraph-rsid="001c4f14" style:font-weight-asian="normal" style:font-weight-complex="normal"/>
    </style:style>
    <style:style style:name="P6" style:family="paragraph" style:parent-style-name="Standard">
      <style:paragraph-properties fo:text-align="start" style:justify-single-word="false"/>
      <style:text-properties fo:language="fr" fo:country="FR" officeooo:rsid="001d963d" officeooo:paragraph-rsid="001d963d"/>
    </style:style>
    <style:style style:name="P7" style:family="paragraph" style:parent-style-name="Standard">
      <style:paragraph-properties fo:text-align="start" style:justify-single-word="false"/>
      <style:text-properties fo:language="fr" fo:country="FR" officeooo:rsid="002042a3" officeooo:paragraph-rsid="002042a3"/>
    </style:style>
    <style:style style:name="P8" style:family="paragraph" style:parent-style-name="Standard">
      <style:paragraph-properties fo:text-align="start" style:justify-single-word="false"/>
      <style:text-properties fo:language="fr" fo:country="FR" officeooo:rsid="002337a7" officeooo:paragraph-rsid="002337a7"/>
    </style:style>
    <style:style style:name="P9" style:family="paragraph" style:parent-style-name="Standard">
      <style:text-properties fo:language="fr" fo:country="FR"/>
    </style:style>
    <style:style style:name="P10" style:family="paragraph" style:parent-style-name="Standard">
      <style:paragraph-properties fo:text-align="start" style:justify-single-word="false"/>
      <style:text-properties fo:language="fr" fo:country="FR" officeooo:rsid="00246283" officeooo:paragraph-rsid="00246283"/>
    </style:style>
    <style:style style:name="P11" style:family="paragraph" style:parent-style-name="Standard">
      <style:paragraph-properties fo:text-align="start" style:justify-single-word="false"/>
      <style:text-properties fo:language="fr" fo:country="FR" officeooo:rsid="00273b5c" officeooo:paragraph-rsid="00273b5c"/>
    </style:style>
    <style:style style:name="P12" style:family="paragraph" style:parent-style-name="Standard">
      <style:paragraph-properties fo:text-align="start" style:justify-single-word="false"/>
      <style:text-properties fo:language="fr" fo:country="FR" fo:font-weight="normal" officeooo:rsid="001e01fa" officeooo:paragraph-rsid="001d963d" style:font-weight-asian="normal" style:font-weight-complex="normal"/>
    </style:style>
    <style:style style:name="P13" style:family="paragraph" style:parent-style-name="Standard">
      <style:paragraph-properties fo:text-align="start" style:justify-single-word="false"/>
      <style:text-properties fo:language="fr" fo:country="FR" fo:font-weight="normal" officeooo:rsid="002042a3" officeooo:paragraph-rsid="00203cfe" style:font-weight-asian="normal" style:font-weight-complex="normal"/>
    </style:style>
    <style:style style:name="P14" style:family="paragraph" style:parent-style-name="Standard">
      <style:paragraph-properties fo:text-align="start" style:justify-single-word="false"/>
      <style:text-properties fo:language="fr" fo:country="FR" fo:font-weight="normal" officeooo:rsid="002042a3" officeooo:paragraph-rsid="002042a3" style:font-weight-asian="normal" style:font-weight-complex="normal"/>
    </style:style>
    <style:style style:name="P15" style:family="paragraph" style:parent-style-name="Standard">
      <style:paragraph-properties fo:text-align="start" style:justify-single-word="false"/>
      <style:text-properties fo:language="fr" fo:country="FR" fo:font-weight="normal" officeooo:rsid="00246283" officeooo:paragraph-rsid="002337a7" style:font-weight-asian="normal" style:font-weight-complex="normal"/>
    </style:style>
    <style:style style:name="P16" style:family="paragraph" style:parent-style-name="Standard">
      <style:paragraph-properties fo:text-align="start" style:justify-single-word="false"/>
      <style:text-properties fo:language="fr" fo:country="FR" fo:font-weight="normal" officeooo:rsid="00273b5c" officeooo:paragraph-rsid="00273b5c" style:font-weight-asian="normal" style:font-weight-complex="normal"/>
    </style:style>
    <style:style style:name="P17" style:family="paragraph" style:parent-style-name="Standard">
      <style:paragraph-properties fo:text-align="start" style:justify-single-word="false"/>
      <style:text-properties fo:language="fr" fo:country="FR" fo:font-weight="normal" officeooo:rsid="0027e4c8" officeooo:paragraph-rsid="0027e4c8" style:font-weight-asian="normal" style:font-weight-complex="normal"/>
    </style:style>
    <style:style style:name="P18" style:family="paragraph" style:parent-style-name="Standard">
      <style:paragraph-properties fo:text-align="start" style:justify-single-word="false"/>
      <style:text-properties fo:language="fr" fo:country="FR" officeooo:rsid="00168ffd" officeooo:paragraph-rsid="00168ffd"/>
    </style:style>
    <style:style style:name="P19" style:family="paragraph" style:parent-style-name="Standard">
      <style:paragraph-properties fo:text-align="start" style:justify-single-word="false"/>
      <style:text-properties fo:language="fr" fo:country="FR" officeooo:rsid="0028c900" officeooo:paragraph-rsid="0028c900"/>
    </style:style>
    <style:style style:name="P20" style:family="paragraph" style:parent-style-name="Standard">
      <style:paragraph-properties fo:text-align="start" style:justify-single-word="false"/>
      <style:text-properties fo:language="fr" fo:country="FR" officeooo:paragraph-rsid="0027e4c8"/>
    </style:style>
    <style:style style:name="T1" style:family="text">
      <style:text-properties fo:font-weight="bold" style:font-weight-asian="bold" style:font-weight-complex="bold"/>
    </style:style>
    <style:style style:name="T2" style:family="text">
      <style:text-properties fo:font-weight="bold" officeooo:rsid="00173ee3" style:font-weight-asian="bold" style:font-weight-complex="bold"/>
    </style:style>
    <style:style style:name="T3" style:family="text">
      <style:text-properties fo:font-weight="bold" officeooo:rsid="001c4f14" style:font-weight-asian="bold" style:font-weight-complex="bold"/>
    </style:style>
    <style:style style:name="T4" style:family="text">
      <style:text-properties fo:font-weight="bold" officeooo:rsid="0021ec62"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73ee3" style:font-weight-asian="normal" style:font-weight-complex="normal"/>
    </style:style>
    <style:style style:name="T7" style:family="text">
      <style:text-properties fo:font-weight="normal" officeooo:rsid="0018b079" style:font-weight-asian="normal" style:font-weight-complex="normal"/>
    </style:style>
    <style:style style:name="T8" style:family="text">
      <style:text-properties fo:font-weight="normal" officeooo:rsid="001e01fa" style:font-weight-asian="normal" style:font-weight-complex="normal"/>
    </style:style>
    <style:style style:name="T9" style:family="text">
      <style:text-properties fo:font-weight="normal" officeooo:rsid="00203cfe" style:font-weight-asian="normal" style:font-weight-complex="normal"/>
    </style:style>
    <style:style style:name="T10" style:family="text">
      <style:text-properties fo:font-weight="normal" officeooo:rsid="002042a3" style:font-weight-asian="normal" style:font-weight-complex="normal"/>
    </style:style>
    <style:style style:name="T11" style:family="text">
      <style:text-properties fo:font-weight="normal" officeooo:rsid="0021ec62" style:font-weight-asian="normal" style:font-weight-complex="normal"/>
    </style:style>
    <style:style style:name="T12" style:family="text">
      <style:text-properties fo:font-weight="normal" officeooo:rsid="00246283" style:font-weight-asian="normal" style:font-weight-complex="normal"/>
    </style:style>
    <style:style style:name="T13" style:family="text">
      <style:text-properties fo:font-weight="normal" officeooo:rsid="00257c54" style:font-weight-asian="normal" style:font-weight-complex="normal"/>
    </style:style>
    <style:style style:name="T14" style:family="text">
      <style:text-properties fo:font-weight="normal" officeooo:rsid="0027e4c8" style:font-weight-asian="normal" style:font-weight-complex="normal"/>
    </style:style>
    <style:style style:name="T15" style:family="text">
      <style:text-properties fo:font-weight="normal" officeooo:rsid="002a989f" style:font-weight-asian="normal" style:font-weight-complex="normal"/>
    </style:style>
    <style:style style:name="T16" style:family="text">
      <style:text-properties fo:font-weight="normal" officeooo:rsid="002b32c0" style:font-weight-asian="normal" style:font-weight-complex="normal"/>
    </style:style>
    <style:style style:name="T17" style:family="text">
      <style:text-properties officeooo:rsid="0018b079"/>
    </style:style>
    <style:style style:name="T18" style:family="text">
      <style:text-properties fo:language="fr" fo:country="FR" fo:font-weight="normal" officeooo:rsid="0027e4c8" style:font-weight-asian="normal" style:font-weight-complex="normal"/>
    </style:style>
    <style:style style:name="T19" style:family="text">
      <style:text-properties officeooo:rsid="0028c900"/>
    </style:style>
    <style:style style:name="T20" style:family="text">
      <style:text-properties officeooo:rsid="002a989f"/>
    </style:style>
    <style:style style:name="T21" style:family="text">
      <style:text-properties officeooo:rsid="002afa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Aujourd’hui je vous présent quatre article qui se touchent actuellement sur l’état de notre monde en plusieurs aspects, bon et mal, et comment on fait améliorer ces problèmes maintenant.</text:p>
      <text:p text:style-name="P1"/>
      <text:p text:style-name="P1">Le premier article <text:span text:style-name="T1">En France, on fait revivre la cuisine traditionnelle à prix abordable</text:span><text:span text:style-name="T3"> </text:span>est issu du site journalist<text:span text:style-name="T17">ique </text:span>en ligne <text:span text:style-name="T1">Radio-télévision de Slovénie</text:span><text:span text:style-name="T5">, de l’écrivaine Kaja Sajovic, écrit le 2. mai 2026. Le sujet de l’article est le concept français de restaurants nommés </text:span><text:span text:style-name="T2">bouillon</text:span><text:span text:style-name="T5">, leur histoire, </text:span><text:span text:style-name="T7">leur </text:span><text:span text:style-name="T5">évolution et une importance </text:span><text:span text:style-name="T7">croissante </text:span><text:span text:style-name="T5">aujourd’hui. </text:span></text:p>
      <text:p text:style-name="P3"/>
      <text:p text:style-name="P1"><text:span text:style-name="T5">L’article commence par résumer l’histoire unique d</text:span><text:span text:style-name="T7">u</text:span><text:span text:style-name="T5"> restaurant </text:span><text:span text:style-name="T6">bouillon</text:span><text:span text:style-name="T5"> </text:span><text:span text:style-name="T7">en </text:span><text:span text:style-name="T5">France. Le pr</text:span><text:span text:style-name="T7">e</text:span><text:span text:style-name="T5">mier a été ouvert en France en 1850 avec le but de rassasier de nombreu</text:span><text:span text:style-name="T7">x </text:span><text:span text:style-name="T5">ouvriers. Au tournant du siècle il y </text:span><text:span text:style-name="T6">a eu</text:span><text:span text:style-name="T5"> 250 d’eux à Paris,</text:span><text:span text:style-name="T6"> où on </text:span><text:span text:style-name="T7">pouvait </text:span><text:span text:style-name="T6">manger un repas copieux bon marché. </text:span><text:span text:style-name="T7">Tandis </text:span><text:span text:style-name="T6">que les tendances alimentaires </text:span><text:span text:style-name="T7">ont </text:span><text:span text:style-name="T6">changé en faveur de repas meilleurs et plus chers, de </text:span><text:span text:style-name="T7">nourriture</text:span><text:span text:style-name="T6"> rapide, de gastronomie, le bouillon devenait moins populaire. Mais le courant s’est tourné dans les dernières années, et plus </text:span><text:span text:style-name="T7">de </text:span><text:span text:style-name="T6">250 ont été ouvert</text:span><text:span text:style-name="T7">s en</text:span><text:span text:style-name="T6"> France. C’est considéré comme un </text:span><text:span text:style-name="T7">point de départ pour découvrir la gastronomie française. Les chefs de bouillon affirment qu’on doit payer moins de 20 euros pour un repas complet. Le projet est aussi important en tant qu’espace où tous les gens peuvent se réunir sans se faire des soucis pour le prix.</text:span></text:p>
      <text:p text:style-name="P4"/>
      <text:p text:style-name="P2"><text:span text:style-name="T8">Le</text:span><text:span text:style-name="T5"> deuxième article </text:span><text:span text:style-name="T1">Bataille mondiale pour l’énergie </text:span><text:span text:style-name="T5">s</text:span><text:span text:style-name="T9">’o</text:span><text:span text:style-name="T5">ccupe </text:span><text:span text:style-name="T9">aussi </text:span><text:span text:style-name="T8">du </text:span><text:span text:style-name="T5">problèm</text:span><text:span text:style-name="T8">e</text:span><text:span text:style-name="T5"> des produits bon marché, mais dans le secteur de l’énergie. Il est issu </text:span><text:span text:style-name="T8">du </text:span><text:span text:style-name="T1">Le monde diplomatique</text:span><text:span text:style-name="T5">, par l’écrivain Michael Klare, publié en mai 2026. L’auteur se concentre sur le sujet des changements subits des sources de pétrole et gaz en prix et acce</text:span><text:span text:style-name="T8">s</text:span><text:span text:style-name="T5">sibilité, provoqué</text:span><text:span text:style-name="T8">s</text:span><text:span text:style-name="T5"> par la guerre en Iran.</text:span></text:p>
      <text:p text:style-name="P5"/>
      <text:p text:style-name="P6"><text:span text:style-name="T5">L’article explique que dans l</text:span><text:span text:style-name="T8">a</text:span><text:span text:style-name="T5"> politique de l’énergie, tou</text:span><text:span text:style-name="T8">t</text:span><text:span text:style-name="T5"> change continuellement, où chaque </text:span><text:span text:style-name="T8">acteur</text:span><text:span text:style-name="T5"> a ses propres intérêts. Il </text:span><text:span text:style-name="T8">constate</text:span><text:span text:style-name="T5">, que au début de la guerre russo-</text:span><text:span text:style-name="T8">ukrainienne</text:span><text:span text:style-name="T5">, les pays européens </text:span><text:span text:style-name="T8">devaient </text:span><text:span text:style-name="T5">changer leurs sources de pétrole et gaz. Ils se sont </text:span><text:span text:style-name="T8">tournés ver le </text:span><text:span text:style-name="T5">Proche-Orient et </text:span><text:span text:style-name="T8">les </text:span><text:span text:style-name="T5">Etats-</text:span><text:span text:style-name="T8">U</text:span><text:span text:style-name="T5">nis, où les entr</text:span><text:span text:style-name="T8">e</text:span><text:span text:style-name="T5">prises gagnaient </text:span><text:span text:style-name="T8">davantage</text:span><text:span text:style-name="T5">. </text:span><text:span text:style-name="T8">Cela a été à nouveau</text:span><text:span text:style-name="T5"> bouleversé </text:span><text:span text:style-name="T8">avec </text:span><text:span text:style-name="T5">la </text:span><text:span text:style-name="T8">fermeture</text:span><text:span text:style-name="T5"> </text:span><text:span text:style-name="T8">du</text:span><text:span text:style-name="T5"> détroit de l’Ormuz, à travers lequel</text:span><text:span text:style-name="T8"> </text:span><text:span text:style-name="T5">une grande quantité d’engrais importante pour l’agriculture </text:span><text:span text:style-name="T8">transitait </text:span><text:span text:style-name="T5">autrefois. Il </text:span><text:span text:style-name="T8">parle aussi </text:span><text:span text:style-name="T5">des crises dans le</text:span><text:span text:style-name="T8">sq</text:span><text:span text:style-name="T5">uelles des pays asiatiques, l’Inde et les Philippines ont été plongées, à cause </text:span><text:span text:style-name="T8">de leur dépendance envers les matières arabes. Il finit par mentionner toutes les solutions que les états ont dû prendre pour améliorer la situation, comme brûler plus de charbon ou investir dans les technologies vertes. Dans tous les cas, on ne peut pas oublier comment cela influence le climat.</text:span></text:p>
      <text:p text:style-name="P12"/>
      <text:p text:style-name="P9"><text:span text:style-name="T8">L</text:span><text:span text:style-name="T5">e troisième </text:span><text:span text:style-name="T10">article est </text:span><text:span text:style-name="T5">intitulé </text:span><text:span text:style-name="T1">C’est ce que propose la start-up Merci Raymond pour nourrir le débat public autour du dérèglement climatique</text:span><text:span text:style-name="T5">. Il a été publié le 27. mars </text:span><text:span text:style-name="T11">en </text:span><text:span text:style-name="T4">Le nouvel économiste</text:span><text:span text:style-name="T5">, écrit par Anne Thiriet. </text:span><text:span text:style-name="T10">Le sujet de l’article est une idée de transformer des ponts de Paris en petits parcs, lesquels peuvent aider à améliorer les effets du réchauffement climatique.</text:span></text:p>
      <text:p text:style-name="P13"/>
      <text:p text:style-name="P7"><text:span text:style-name="T5">Il explore la start-up Merci Raymond, laquelle propose à transformer les 35 de Paris en espaces végétalisés. Aujourd’hui ils sont très exposées au soleil et accumulent du chaleur. Avec le création d’une strate végétale on peut ressentir 4 dégrées Celsius moins grâce à des plantes. On pourrait aussi dédier quelques ponts au jardiner, produire des légumes, comme amphithéâtres, skateparks, kiosques de lecture, cafés. La start-up dit que les ponts offrent vues incroyables dont on profite en fait très peu. </text:span><text:span text:style-name="T11">L’objectif donné est de faire pousser 50 000 plantes, placer des arbres et générer 20 000 m² d’espaces verts.</text:span></text:p>
      <text:p text:style-name="P14"/>
      <text:p text:style-name="P8"><text:span text:style-name="T5">Le dernier article </text:span><text:span text:style-name="T1">L’empreinte carbone du tourisme en France </text:span><text:span text:style-name="T13">a été publie dans</text:span><text:span text:style-name="T5"> </text:span><text:span text:style-name="T1">La Tribune </text:span><text:span text:style-name="T5">le 1</text:span><text:span text:style-name="T13">er</text:span><text:span text:style-name="T5"> mai, écrit par Agathe Perrier. </text:span><text:span text:style-name="T12">L</text:span><text:span text:style-name="T5">’article est </text:span><text:span text:style-name="T12">une </text:span><text:span text:style-name="T5">analyse environnemental</text:span><text:span text:style-name="T13">e</text:span><text:span text:style-name="T5"> d</text:span><text:span text:style-name="T13">u</text:span><text:span text:style-name="T5"> tourisme en France avec un calcul de</text:span><text:span text:style-name="T12">s émissions </text:span><text:span text:style-name="T13">effectuées</text:span><text:span text:style-name="T12">.</text:span></text:p>
      <text:p text:style-name="P15"/>
      <text:p text:style-name="P10"><text:soft-page-break/><text:span text:style-name="T13">L’article</text:span><text:span text:style-name="T5"> commence par </text:span><text:span text:style-name="T13">indiquer </text:span><text:span text:style-name="T5">que 75 millions de tonnes </text:span><text:span text:style-name="T13">de </text:span><text:span text:style-name="T5">CO2 ont été émis</text:span><text:span text:style-name="T13">es</text:span><text:span text:style-name="T5"> en 2023 pour produire les biens et services </text:span><text:span text:style-name="T13">consommés </text:span><text:span text:style-name="T5">par les touristes en France </text:span><text:span text:style-name="T13">sur un total </text:span><text:span text:style-name="T5">de 644 million</text:span><text:span text:style-name="T13">s</text:span><text:span text:style-name="T5"> de tonnes totale</text:span><text:span text:style-name="T13">s</text:span><text:span text:style-name="T5">. L’intensité carbone de la consommation touristique est plus haut</text:span><text:span text:style-name="T13">e</text:span><text:span text:style-name="T5"> que ce</text:span><text:span text:style-name="T13">lle</text:span><text:span text:style-name="T5"> de la demande finale français</text:span><text:span text:style-name="T13">e :</text:span><text:span text:style-name="T5"> 0.35kg d</text:span><text:span text:style-name="T13">e </text:span><text:span text:style-name="T5">CO2 contre 0.20 kg par euro dépensé. C’est 75 % plus intense </text:span><text:span text:style-name="T13">en termes d’</text:span><text:span text:style-name="T5">émission</text:span><text:span text:style-name="T13">s</text:span><text:span text:style-name="T5">. Cette forte empreinte s’explique par certains activités touristiques qui sont fortement émettrices. Le transport représent</text:span><text:span text:style-name="T13">e </text:span><text:span text:style-name="T5">deux tiers des émissions, 16 % l’hébergement et 11 % l’alimentation. </text:span><text:span text:style-name="T13">Dans </text:span><text:span text:style-name="T5">le secteur d</text:span><text:span text:style-name="T13">u</text:span><text:span text:style-name="T5"> transport, 25 % des émissions </text:span><text:span text:style-name="T13">sont </text:span><text:span text:style-name="T5">liées </text:span><text:span text:style-name="T13">au </text:span><text:span text:style-name="T5">transport aérien, alors qu’il ne </text:span><text:span text:style-name="T13">représente que </text:span><text:span text:style-name="T5">9 % des consommations. </text:span><text:span text:style-name="T13">Par rapport à </text:span><text:span text:style-name="T5">l’empreinte fait</text:span><text:span text:style-name="T13">e</text:span><text:span text:style-name="T5"> </text:span><text:span text:style-name="T13">avant </text:span><text:span text:style-name="T5">les années d</text:span><text:span text:style-name="T13">u</text:span><text:span text:style-name="T5"> Covid, le niveau de l’empreinte est </text:span><text:span text:style-name="T13">inférieur de </text:span><text:span text:style-name="T5">17 % . De ce</text:span><text:span text:style-name="T13">tte</text:span><text:span text:style-name="T5"> diminution, 43 % </text:span><text:span text:style-name="T13">en </text:span><text:span text:style-name="T5">est </text:span><text:span text:style-name="T13">attribuable à </text:span><text:span text:style-name="T5">un</text:span><text:span text:style-name="T13">e</text:span><text:span text:style-name="T5"> baisse </text:span><text:span text:style-name="T13">du </text:span><text:span text:style-name="T5">transport aérien. La guerre au Moyen-Orient pourrait </text:span><text:span text:style-name="T13">faire </text:span><text:span text:style-name="T5">baisser le trafic encore et faire diminuer </text:span><text:span text:style-name="T13">l</text:span><text:span text:style-name="T5">es émissions. Un sondage demandant </text:span><text:span text:style-name="T13">aux </text:span><text:span text:style-name="T5">Français, où ils veulent séjourner </text:span><text:span text:style-name="T13">révèle que</text:span><text:span text:style-name="T5"> 71 % </text:span><text:span text:style-name="T13">souhaitent </text:span><text:span text:style-name="T5">dans l’Hexagone, </text:span><text:span text:style-name="T13">soit </text:span><text:span text:style-name="T5">3 points en hausse sur un an.</text:span></text:p>
      <text:p text:style-name="P12"/>
      <text:p text:style-name="P11"><text:span text:style-name="T8">L</text:span><text:span text:style-name="T5">ES MOTS </text:span><text:span text:style-name="T16">ET EXPRESSIONS INCONNUS</text:span></text:p>
      <text:p text:style-name="P16"/>
      <text:p text:style-name="P16">1. un impensé – <text:span text:style-name="T19">nemišljeno - « </text:span><text:span text:style-name="T20">les ponts restent un impensé « ;</text:span></text:p>
      <text:p text:style-name="P16">2. être minéral(e) – <text:span text:style-name="T20">brez zelenja, pusto, asfaltno, betonsko - « ces traversées très minérales sont exposées au soleil » ;</text:span></text:p>
      <text:p text:style-name="P16">3. <text:span text:style-name="T20">la </text:span>bulle de &lt;fraîcheur&gt; - <text:span text:style-name="T20">omejen prostor prijetnih temperatur in vlage ;</text:span></text:p>
      <text:p text:style-name="P16">4. <text:span text:style-name="T20">la </text:span>brumisateur – <text:span text:style-name="T20">naprava, ki širi vodne hlape ;</text:span></text:p>
      <text:p text:style-name="P16">5. terrain de pétanque – <text:span text:style-name="T20">igrišče za balinčkanje ;</text:span></text:p>
      <text:p text:style-name="P16">6. <text:span text:style-name="T20">une </text:span>intempérie – <text:span text:style-name="T20">nezaželen vremenski dogodek ;</text:span></text:p>
      <text:p text:style-name="P16">7. <text:span text:style-name="T20">la </text:span>voirie – <text:span text:style-name="T20">infrastruktura javnih dobrin ;</text:span></text:p>
      <text:p text:style-name="P16">8. épargner – <text:span text:style-name="T20">prizanesti - « La hausse des cours du pétrole n’a pas épargné les États-Unis » ;</text:span></text:p>
      <text:p text:style-name="P11"><text:span text:style-name="T5">9. l</text:span><text:span text:style-name="T15">e </text:span><text:span text:style-name="T14">gisement – </text:span><text:span text:style-name="T15">le gisement - « gisement de fer, de houille, d'uranium » ;</text:span></text:p>
      <text:p text:style-name="P17">10. <text:span text:style-name="T20">le</text:span> limon – <text:span text:style-name="T20">blato - « la matière a été recouverte de sable et de limon et convertie en hydrocarbures » ;</text:span></text:p>
      <text:p text:style-name="P20"><text:span text:style-name="T14">11. </text:span><text:span text:style-name="T5">pour-voyeur – </text:span><text:span text:style-name="T15">dobavitelj - “les États du Golfe figurent parmi les principaux pourvoyeurs”;</text:span></text:p>
      <text:p text:style-name="P16">1<text:span text:style-name="T21">2. acharné(e) – zagrizen - « une concurrence acharnée »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4T12:09:32.030753889</meta:creation-date>
    <dc:date>2026-05-15T17:25:36.728437765</dc:date>
    <meta:editing-duration>PT38M33S</meta:editing-duration>
    <meta:editing-cycles>8</meta:editing-cycles>
    <meta:generator>LibreOffice/7.3.7.2$Linux_X86_64 LibreOffice_project/30$Build-2</meta:generator>
    <meta:document-statistic meta:table-count="0" meta:image-count="0" meta:object-count="0" meta:page-count="2" meta:paragraph-count="22" meta:word-count="985" meta:character-count="5996" meta:non-whitespace-character-count="5022"/>
  </office:meta>
</office:document-meta>
</file>